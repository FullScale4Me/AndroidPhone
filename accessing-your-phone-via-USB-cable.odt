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5BAE2FDA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.0799in" style:contextual-spacing="false"/>
      <style:text-properties fo:font-size="26pt" style:font-size-asian="26pt" style:font-size-complex="26pt"/>
    </style:style>
    <style:style style:name="P2" style:family="paragraph" style:parent-style-name="Standard">
      <style:text-properties officeooo:paragraph-rsid="001f93ed"/>
    </style:style>
    <style:style style:name="P3" style:family="paragraph" style:parent-style-name="Standard">
      <style:text-properties officeooo:paragraph-rsid="00263c4f"/>
    </style:style>
    <style:style style:name="P4" style:family="paragraph" style:parent-style-name="Standard">
      <style:text-properties officeooo:paragraph-rsid="001fa25f"/>
    </style:style>
    <style:style style:name="P5" style:family="paragraph" style:parent-style-name="Standard">
      <style:text-properties officeooo:rsid="001fa25f" officeooo:paragraph-rsid="001fa25f"/>
    </style:style>
    <style:style style:name="P6" style:family="paragraph" style:parent-style-name="Standard">
      <style:paragraph-properties fo:margin-left="2.4618in" fo:text-indent="0in" style:auto-text-indent="false"/>
      <style:text-properties officeooo:rsid="001fa25f" officeooo:paragraph-rsid="001fa25f"/>
    </style:style>
    <style:style style:name="P7" style:family="paragraph" style:parent-style-name="Standard">
      <style:text-properties officeooo:rsid="001f93ed" officeooo:paragraph-rsid="001f93ed"/>
    </style:style>
    <style:style style:name="P8" style:family="paragraph" style:parent-style-name="Standard">
      <style:text-properties officeooo:rsid="001f93ed" officeooo:paragraph-rsid="00270747"/>
    </style:style>
    <style:style style:name="P9" style:family="paragraph" style:parent-style-name="Standard">
      <style:text-properties officeooo:rsid="001fa25f" officeooo:paragraph-rsid="00270747"/>
    </style:style>
    <style:style style:name="P10" style:family="paragraph" style:parent-style-name="Standard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270747"/>
    </style:style>
    <style:style style:name="P12" style:family="paragraph" style:parent-style-name="Standard">
      <style:text-properties officeooo:rsid="0024800e" officeooo:paragraph-rsid="0024800e"/>
    </style:style>
    <style:style style:name="P13" style:family="paragraph" style:parent-style-name="Standard">
      <style:text-properties fo:font-size="14pt" officeooo:paragraph-rsid="0026f065" style:font-size-asian="12.25pt" style:font-size-complex="14pt"/>
    </style:style>
    <style:style style:name="P14" style:family="paragraph" style:parent-style-name="Text_20_body">
      <style:paragraph-properties fo:margin-top="0in" fo:margin-bottom="0.0201in" style:contextual-spacing="false" fo:line-height="115%" fo:text-align="justify" style:justify-single-word="false" style:writing-mode="lr-tb"/>
      <style:text-properties officeooo:paragraph-rsid="0026f065"/>
    </style:style>
    <style:style style:name="P15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26f065"/>
    </style:style>
    <style:style style:name="T1" style:family="text">
      <style:text-properties officeooo:rsid="00206cd1"/>
    </style:style>
    <style:style style:name="T2" style:family="text">
      <style:text-properties officeooo:rsid="001f93ed"/>
    </style:style>
    <style:style style:name="T3" style:family="text">
      <style:text-properties officeooo:rsid="00263c4f"/>
    </style:style>
    <style:style style:name="T4" style:family="text">
      <style:text-properties officeooo:rsid="001fa25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0a5c"/>
    </style:style>
    <style:style style:name="T7" style:family="text">
      <style:text-properties officeooo:rsid="0026d330"/>
    </style:style>
    <style:style style:name="T8" style:family="text">
      <style:text-properties officeooo:rsid="00270747"/>
    </style:style>
    <style:style style:name="T9" style:family="text">
      <style:text-properties officeooo:rsid="0022ddb1"/>
    </style:style>
    <style:style style:name="T10" style:family="text">
      <style:text-properties officeooo:rsid="0024800e"/>
    </style:style>
    <style:style style:name="T11" style:family="text">
      <style:text-properties fo:font-weight="bold" officeooo:rsid="00206cd1" style:font-weight-asian="bold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officeooo:rsid="002ad3d5" style:font-weight-asian="bold" style:font-weight-complex="bold"/>
    </style:style>
    <style:style style:name="T15" style:family="text">
      <style:text-properties officeooo:rsid="0026f065"/>
    </style:style>
    <style:style style:name="T16" style:family="text">
      <style:text-properties officeooo:rsid="0030f2ce"/>
    </style:style>
    <style:style style:name="T17" style:family="text">
      <style:text-properties officeooo:rsid="0083fb8c"/>
    </style:style>
    <style:style style:name="T18" style:family="text">
      <style:text-properties officeooo:rsid="00386d4c"/>
    </style:style>
    <style:style style:name="T19" style:family="text">
      <style:text-properties officeooo:rsid="0103d37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.5402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ccess<text:span text:style-name="T1">ing</text:span> your phone via USB cable</text:p>
      <text:p text:style-name="Standard"/>
      <text:p text:style-name="P2"><text:span text:style-name="T2">C</text:span>onnect to your PC using the USB cable.</text:p>
      <text:p text:style-name="P2"/>
      <text:p text:style-name="P3"><text:span text:style-name="T3">C</text:span><text:span text:style-name="T2">heck the notifications </text:span><text:span text:style-name="T3">on your phone by s</text:span>wiping <text:span text:style-name="T3">the screen </text:span>from the top to bottom<text:span text:style-name="T2">.</text:span></text:p>
      <text:p text:style-name="P4"/>
      <text:p text:style-name="P4"><text:span text:style-name="T4">I</text:span>f the connection has been recognized <text:span text:style-name="T1">by your phone</text:span> <text:span text:style-name="T4">you should see </text:span><text:span text:style-name="T1">a two line notice</text:span><text:span text:style-name="T4">:</text:span></text:p>
      <text:p text:style-name="P5"/>
      <text:p text:style-name="P6">'<text:span text:style-name="T5">USB for charging phone</text:span>'</text:p>
      <text:p text:style-name="P6">'<text:span text:style-name="T5">Tap for other USB options.</text:span>'</text:p>
      <text:p text:style-name="P2"><text:span text:style-name="T2">T</text:span>ap th<text:span text:style-name="T4">is</text:span> notification.</text:p>
      <text:p text:style-name="Standard"/>
      <text:p text:style-name="P7">In <text:span text:style-name="T4">the section </text:span><text:span text:style-name="T1">named </text:span><text:span text:style-name="T4">'</text:span>Use USB for' select '<text:span text:style-name="T5">Transferring files / Android Auto</text:span>'</text:p>
      <text:p text:style-name="P7"/>
      <text:p text:style-name="P5">Enter your PIN w<text:span text:style-name="T6">h</text:span>en prompted and tap '<text:span text:style-name="T5">OK</text:span>'.</text:p>
      <text:p text:style-name="P7"><draw:frame draw:style-name="fr1" draw:name="Image100" text:anchor-type="paragraph" svg:y="0.172in" svg:width="3.7571in" svg:height="2.2098in" draw:z-index="0"><draw:image xlink:href="Pictures/10000001000001F40000015BAE2FDAE1.png" xlink:type="simple" xlink:show="embed" xlink:actuate="onLoad" draw:mime-type="image/png"/></draw:frame></text:p>
      <text:p text:style-name="P8">Your phone should <text:span text:style-name="T7">now </text:span>appear <text:span text:style-name="T4">as:</text:span></text:p>
      <text:p text:style-name="P8"/>
      <text:p text:style-name="P9">'SAMSUNG Android'</text:p>
      <text:p text:style-name="P8"/>
      <text:p text:style-name="P8">in the File Manager <text:span text:style-name="T7">s</text:span><text:span text:style-name="T4">ection 'Devices'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If the above does not work</text:h>
      <text:p text:style-name="P10"/>
      <text:p text:style-name="P2"><text:span text:style-name="T2">Go to:</text:span> 'Settings &gt; Apps &gt;' <text:span text:style-name="T8">and t</text:span>Tap the 3 lines with the downward facing arrow, to the right of 'Your apps' &gt;</text:p>
      <text:p text:style-name="P2"/>
      <text:p text:style-name="P2"><text:span text:style-name="T2">Toggle on '</text:span>Show system apps &gt;' <text:span text:style-name="T9">then t</text:span><text:span text:style-name="T2">ap '</text:span>OK &gt;'</text:p>
      <text:p text:style-name="P2"/>
      <text:p text:style-name="P11">Scroll down, and tap on 'USB Settings &gt;'</text:p>
      <text:p text:style-name="P11"/>
      <text:p text:style-name="P11"><text:span text:style-name="T2">Tap</text:span> 'Storage &gt;' <text:span text:style-name="T2">then </text:span><text:span text:style-name="T9">tap </text:span><text:span text:style-name="T2">'</text:span><text:span text:style-name="T9">c</text:span>lear cache' <text:span text:style-name="T8">then</text:span><text:span text:style-name="T2"> '</text:span><text:span text:style-name="T9">c</text:span>lear data'.</text:p>
      <text:p text:style-name="P2"/>
      <text:p text:style-name="P11"><text:span text:style-name="T2">R</text:span>estart your device. <text:span text:style-name="T10">Do this</text:span> <text:span text:style-name="T2">by </text:span><text:span text:style-name="T9">pressing</text:span><text:span text:style-name="T2"> 'down-volume' and 'power' at the same time </text:span><text:span text:style-name="T9">and hold</text:span><text:span text:style-name="T2">.</text:span></text:p>
      <text:p text:style-name="P8"/>
      <text:p text:style-name="P8">Tap the 'Restart' twice.</text:p>
      <text:p text:style-name="P7"/>
      <text:p text:style-name="P12"><text:span text:style-name="T5">Verified</text:span> on a Samsung S23 <text:span text:style-name="T11">Inspiration</text:span><text:span text:style-name="T1">: </text:span><text:a xlink:type="simple" xlink:href="https://eu.community.samsung.com/t5/other-galaxy-s-series/usb-connection/td-p/7469166" text:style-name="Internet_20_link" text:visited-style-name="Visited_20_Internet_20_Link"><text:span text:style-name="T1">https://eu.community.samsung.com/t5/other-galaxy-s-series/usb-connection/td-p/7469166</text:span></text:a></text:p>
      <text:p text:style-name="P13"/>
      <text:p text:style-name="P13"/>
      <text:p text:style-name="P13"/>
      <text:p text:style-name="P14"><text:span text:style-name="T12">Please direct ALL support requests to the MX Linux Forum</text:span><text:span text:style-name="T13"> <text:s/>-- <text:s/></text:span><text:a xlink:type="simple" xlink:href="https://forum.mxlinux.org/" text:style-name="Internet_20_link" text:visited-style-name="Visited_20_Internet_20_Link"><text:span text:style-name="T13">https://forum.mxlinux.org/</text:span></text:a></text:p>
      <text:p text:style-name="P15"><text:span text:style-name="T14">Created:</text:span> <text:span text:style-name="T15">Jul</text:span><text:span text:style-name="T16">y </text:span><text:span text:style-name="T15">7</text:span>, 202<text:span text:style-name="T16">6</text:span><text:tab/><text:tab/><text:tab/><text:tab/><text:tab/><text:tab/> <text:s text:c="8"/><text:span text:style-name="T5">Updated</text:span>: <text:span text:style-name="T16">Ju</text:span><text:span text:style-name="T17">ly </text:span><text:span text:style-name="T15">7</text:span><text:span text:style-name="T18">, 202</text:span><text:span text:style-name="T19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902in" fo:margin-bottom="0.3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hael O'Toole</meta:initial-creator>
    <meta:creation-date>2026-07-07T21:21:47.614913684</meta:creation-date>
    <dc:date>2026-07-07T22:41:42.813769310</dc:date>
    <dc:creator>Michael O'Toole</dc:creator>
    <meta:editing-duration>PT57M40S</meta:editing-duration>
    <meta:editing-cycles>10</meta:editing-cycles>
    <meta:generator>LibreOffice/26.2.4.2$Linux_X86_64 LibreOffice_project/0229ac93fcf0d7cbc6376066c6f35021cef002dc</meta:generator>
    <dc:title>Accessing your phone via USB cable</dc:title>
    <meta:printed-by>Michael O'Toole</meta:printed-by>
    <meta:print-date>2026-07-07T22:20:00.078111584</meta:print-date>
    <meta:document-statistic meta:table-count="0" meta:image-count="1" meta:object-count="0" meta:page-count="1" meta:paragraph-count="22" meta:word-count="196" meta:character-count="1185" meta:non-whitespace-character-count="995"/>
  </office:meta>
</office:document-meta>
</file>